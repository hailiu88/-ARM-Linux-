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cccccc" loext:fill-use-slide-background="false" draw:textarea-horizontal-align="justify" draw:textarea-vertical-align="middle" draw:auto-grow-height="false" fo:min-height="0.716cm" fo:min-width="3.466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16cm" fo:min-width="3.466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216cm" fo:min-width="3.466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dddddd" loext:fill-use-slide-background="false" draw:textarea-horizontal-align="justify" draw:textarea-vertical-align="middle" draw:auto-grow-height="false" fo:min-height="0.216cm" fo:min-width="3.46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cccccc" loext:fill-use-slide-background="false" draw:textarea-horizontal-align="justify" draw:textarea-vertical-align="middle" draw:auto-grow-height="false" fo:min-height="0.216cm" fo:min-width="3.466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cccccc" loext:fill-use-slide-background="false" draw:opacity="100%" draw:textarea-horizontal-align="justify" draw:textarea-vertical-align="middle" draw:auto-grow-height="false" fo:min-height="0.216cm" fo:min-width="3.466cm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="线条箭头_20_1" draw:marker-start-width="0.3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objectwithoutfill">
      <style:graphic-properties svg:stroke-opacity="0%" draw:fill="none" draw:textarea-vertical-align="middle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5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34cm" fo:min-width="0cm" loext:decorative="false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线条箭头_20_3" draw:marker-end-width="0.3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objectwithoutfill">
      <style:graphic-properties svg:stroke-width="0.035cm" svg:stroke-color="#158466" draw:marker-start-width="0.252cm" draw:marker-end="线条箭头_20_4" draw:marker-end-width="0.3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objectwithoutfill">
      <style:graphic-properties svg:stroke-width="0.035cm" svg:stroke-color="#ff8000" draw:marker-start-width="0.252cm" draw:marker-end="线条箭头_20_5" draw:marker-end-width="0.352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svg:stroke-width="0.035cm" svg:stroke-color="#ff4000" draw:marker-start-width="0.252cm" draw:marker-end="线条箭头_20_6" draw:marker-end-width="0.352cm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objectwithoutfill">
      <style:graphic-properties svg:stroke-width="0.035cm" svg:stroke-color="#800080" draw:marker-start-width="0.252cm" draw:marker-end="线条箭头_20_7" draw:marker-end-width="0.352cm" draw:fill="none" draw:textarea-vertical-align="middle" fo:padding-top="0.142cm" fo:padding-bottom="0.142cm" fo:padding-left="0.267cm" fo:padding-right="0.267cm" loext:decorative="false"/>
    </style:style>
    <style:style style:name="gr20" style:family="graphic" style:parent-style-name="objectwithoutfill">
      <style:graphic-properties svg:stroke-width="0.035cm" svg:stroke-color="#ff0000" draw:marker-start-width="0.252cm" draw:marker-end="线条箭头_20_8" draw:marker-end-width="0.3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35cm" svg:stroke-color="#000000" draw:marker-start-width="0.252cm" draw:marker-end="线条箭头_20_9" draw:marker-end-width="0.352cm" draw:fill="none" draw:textarea-vertical-align="middle" fo:padding-top="0.142cm" fo:padding-bottom="0.142cm" fo:padding-left="0.267cm" fo:padding-right="0.267cm" loext:decorative="false"/>
    </style:style>
    <style:style style:name="gr22" style:family="graphic" style:parent-style-name="objectwithoutfill">
      <style:graphic-properties svg:stroke-width="0.035cm" svg:stroke-color="#800080" draw:marker-start-width="0.252cm" draw:marker-end="线条箭头_20_10" draw:marker-end-width="0.352cm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objectwithoutfill">
      <style:graphic-properties svg:stroke-width="0.035cm" svg:stroke-color="#ff8000" draw:marker-start-width="0.252cm" draw:marker-end="线条箭头_20_11" draw:marker-end-width="0.352cm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objectwithoutfill">
      <style:graphic-properties svg:stroke-width="0.035cm" svg:stroke-color="#158466" draw:marker-start-width="0.252cm" draw:marker-end="线条箭头_20_12" draw:marker-end-width="0.352cm" draw:fill="none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svg:stroke-width="0.035cm" svg:stroke-color="#ff0000" draw:marker-start-width="0.252cm" draw:marker-end="线条箭头_20_13" draw:marker-end-width="0.3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objectwithoutfill">
      <style:graphic-properties svg:stroke-width="0.035cm" svg:stroke-color="#ff0000" draw:marker-start-width="0.252cm" draw:marker-end="线条箭头_20_14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solid" draw:fill-color="#cccccc" draw:opacity="10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1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cm" svg:height="1cm" svg:x="4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4cm" svg:y="12cm">
          <text:p text:style-name="P2"><text:span text:style-name="T1">CSF,certificates</text:span><text:span text:style-name="T1">及</text:span><text:span text:style-name="T1">signatu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cm" svg:x="4cm" svg:y="11cm">
          <text:p text:style-name="P2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0.5cm" svg:x="4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0.5cm" svg:x="4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cm" svg:x="4cm" svg:y="10cm">
          <text:p text:style-name="P2"><text:span text:style-name="T1">DC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cm" svg:x="4cm" svg:y="9cm">
          <text:p text:style-name="P2"><text:span text:style-name="T1">Plugin flag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0.5cm" svg:x="4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cm" svg:height="0.5cm" svg:x="4cm" svg:y="7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4cm" svg:height="0.5cm" svg:x="4cm" svg:y="6cm">
          <text:p text:style-name="P2"><text:span text:style-name="T1">csf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4cm" svg:height="0.5cm" svg:x="4cm" svg:y="5.5cm">
          <text:p text:style-name="P2"><text:span text:style-name="T1">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cm" svg:height="0.5cm" svg:x="4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cm" svg:height="0.5cm" svg:x="4cm" svg:y="4.5cm">
          <text:p text:style-name="P2"><text:span text:style-name="T1">D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cm" svg:height="0.5cm" svg:x="4cm" svg:y="8.5cm">
          <text:p text:style-name="P2"><text:span text:style-name="T1">lengt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cm" svg:height="0.5cm" svg:x="4cm" svg:y="7.5cm">
          <text:p text:style-name="P2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cm" svg:x="4cm" svg:y="6.5cm">
          <text:p text:style-name="P2"><text:span text:style-name="T1">reserved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cm" svg:height="0.5cm" svg:x="4cm" svg:y="5cm">
          <text:p text:style-name="P2"><text:span text:style-name="T1">boot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cm" svg:height="0.5cm" svg:x="4cm" svg:y="4cm">
          <text:p text:style-name="P2"><text:span text:style-name="T1">reserved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4cm" svg:height="0.5cm" svg:x="4cm" svg:y="3.5cm">
          <text:p text:style-name="P2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cm" svg:height="0.5cm" svg:x="4cm" svg:y="3cm">
          <text:p text:style-name="P2"><text:span text:style-name="T1">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cm" svg:height="1cm" svg:x="12.0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cm" svg:height="1cm" svg:x="12.015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12.015cm" svg:y="12cm">
          <text:p text:style-name="P2"><text:span text:style-name="T1">CSF,certificates</text:span><text:span text:style-name="T1">及</text:span><text:span text:style-name="T1">signatu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cm" svg:x="12.015cm" svg:y="11cm">
          <text:p text:style-name="P2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0.5cm" svg:x="12.015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0.5cm" svg:x="12.015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cm" svg:x="12.015cm" svg:y="10cm">
          <text:p text:style-name="P2"><text:span text:style-name="T1">DC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cm" svg:x="12.015cm" svg:y="9cm">
          <text:p text:style-name="P2"><text:span text:style-name="T1">Plugin flag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0.5cm" svg:x="12.015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cm" svg:height="0.5cm" svg:x="12.01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4cm" svg:height="0.5cm" svg:x="12.015cm" svg:y="6cm">
          <text:p text:style-name="P2"><text:span text:style-name="T1">csf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4cm" svg:height="0.5cm" svg:x="12.015cm" svg:y="5.5cm">
          <text:p text:style-name="P2"><text:span text:style-name="T1">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cm" svg:height="0.5cm" svg:x="12.015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4cm" svg:height="0.5cm" svg:x="12.015cm" svg:y="4.5cm">
          <text:p text:style-name="P2"><text:span text:style-name="T1">D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cm" svg:height="0.5cm" svg:x="12.015cm" svg:y="8.5cm">
          <text:p text:style-name="P2"><text:span text:style-name="T1">lengt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4cm" svg:height="0.5cm" svg:x="12.015cm" svg:y="7.5cm">
          <text:p text:style-name="P2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cm" svg:x="12.015cm" svg:y="6.5cm">
          <text:p text:style-name="P2"><text:span text:style-name="T1">reserved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4cm" svg:height="0.5cm" svg:x="12.015cm" svg:y="5cm">
          <text:p text:style-name="P2"><text:span text:style-name="T1">boot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cm" svg:height="0.5cm" svg:x="12.015cm" svg:y="4cm">
          <text:p text:style-name="P2"><text:span text:style-name="T1">reserved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" draw:id="id11" draw:layer="layout" svg:width="4cm" svg:height="0.5cm" svg:x="12.015cm" svg:y="3.5cm">
          <text:p text:style-name="P2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cm" svg:height="0.5cm" svg:x="12.015cm" svg:y="3cm">
          <text:p text:style-name="P2"><text:span text:style-name="T1">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xml:id="id1" draw:id="id1" draw:layer="layout" svg:x1="1cm" svg:y1="2cm" svg:x2="4cm" svg:y2="2cm">
          <text:p/>
        </draw:line>
        <draw:line draw:style-name="gr7" draw:text-style-name="P3" xml:id="id2" draw:id="id2" draw:layer="layout" svg:x1="1cm" svg:y1="10cm" svg:x2="4cm" svg:y2="10cm">
          <text:p/>
        </draw:line>
        <draw:connector draw:style-name="gr8" draw:text-style-name="P3" draw:layer="layout" draw:type="line" svg:x1="1cm" svg:y1="2cm" svg:x2="1cm" svg:y2="10cm" draw:start-shape="id1" draw:start-glue-point="3" draw:end-shape="id2" draw:end-glue-point="3" svg:d="M1000 2000v8000" svg:viewBox="0 0 1 8001">
          <text:p/>
        </draw:connector>
        <draw:frame draw:style-name="gr9" draw:text-style-name="P6" draw:layer="layout" svg:width="3cm" svg:height="0.59cm" svg:x="1cm" svg:y="1.5cm">
          <draw:text-box>
            <text:p><text:span text:style-name="T1">引导器件基地址</text:span></text:p>
          </draw:text-box>
        </draw:frame>
        <draw:frame draw:style-name="gr10" draw:text-style-name="P6" draw:layer="layout" svg:width="2.25cm" svg:height="1cm" svg:x="1.75cm" svg:y="3cm">
          <draw:text-box>
            <text:p><text:span text:style-name="T1">Image vector</text:span></text:p>
            <text:p><text:span text:style-name="T1">Table offset</text:span></text:p>
          </draw:text-box>
        </draw:frame>
        <draw:frame draw:style-name="gr11" draw:text-style-name="P6" draw:layer="layout" svg:width="1.716cm" svg:height="0.569cm" svg:x="2.193cm" svg:y="7.542cm">
          <draw:text-box>
            <text:p><text:span text:style-name="T1">Boot data</text:span></text:p>
          </draw:text-box>
        </draw:frame>
        <draw:line draw:style-name="gr12" draw:text-style-name="P3" draw:layer="layout" svg:x1="1.5cm" svg:y1="2cm" svg:x2="1.5cm" svg:y2="10cm">
          <text:p text:style-name="P2"><text:span text:style-name="T1">初始导入区域</text:span></text:p>
        </draw:line>
        <draw:frame draw:style-name="gr13" draw:text-style-name="P7" draw:layer="layout" svg:width="3.954cm" svg:height="0.75cm" svg:x="4cm" svg:y="1.25cm">
          <draw:text-box>
            <text:p text:style-name="P2"><text:span text:style-name="T1">引导器件内存</text:span></text:p>
          </draw:text-box>
        </draw:frame>
        <draw:frame draw:style-name="gr14" draw:text-style-name="P6" draw:layer="layout" svg:width="4cm" svg:height="0.59cm" svg:x="12cm" svg:y="1.41cm">
          <draw:text-box>
            <text:p text:style-name="P2"><text:span text:style-name="T1">目标内存</text:span></text:p>
          </draw:text-box>
        </draw:frame>
        <draw:connector draw:style-name="gr15" draw:text-style-name="P3" draw:layer="layout" svg:x1="8cm" svg:y1="7.75cm" svg:x2="11.906cm" svg:y2="2.06cm" draw:start-shape="id3" draw:start-glue-point="1" svg:d="M8000 7750h2212v-5690h1694" svg:viewBox="0 0 3907 5691">
          <text:p/>
        </draw:connector>
        <draw:connector draw:style-name="gr16" draw:text-style-name="P3" draw:layer="layout" draw:line-skew="-0.193cm" svg:x1="8cm" svg:y1="4.75cm" svg:x2="11.868cm" svg:y2="9.96cm" draw:start-shape="id4" draw:start-glue-point="1" svg:d="M8000 4750h2000v5210h1868" svg:viewBox="0 0 3869 5211">
          <text:p/>
        </draw:connector>
        <draw:connector draw:style-name="gr17" draw:text-style-name="P3" draw:layer="layout" draw:line-skew="-0.453cm" svg:x1="8cm" svg:y1="3.75cm" svg:x2="11.887cm" svg:y2="10.942cm" draw:start-shape="id5" draw:start-glue-point="1" svg:d="M8000 3750h1750v7192h2137" svg:viewBox="0 0 3888 7193">
          <text:p/>
        </draw:connector>
        <draw:connector draw:style-name="gr18" draw:text-style-name="P3" draw:layer="layout" draw:line-skew="-0.693cm" svg:x1="8cm" svg:y1="5.25cm" svg:x2="11.868cm" svg:y2="7.465cm" draw:start-shape="id6" draw:start-glue-point="1" svg:d="M8000 5250h1500v2215h2368" svg:viewBox="0 0 3869 2216">
          <text:p/>
        </draw:connector>
        <draw:connector draw:style-name="gr19" draw:text-style-name="P3" draw:layer="layout" draw:line-skew="-0.934cm" svg:x1="8cm" svg:y1="5.75cm" svg:x2="11.849cm" svg:y2="3.005cm" draw:start-shape="id7" draw:start-glue-point="1" svg:d="M8000 5750h1250v-2745h2599" svg:viewBox="0 0 3850 2746">
          <text:p/>
        </draw:connector>
        <draw:connector draw:style-name="gr20" draw:text-style-name="P3" draw:layer="layout" draw:line-skew="-0.953cm" svg:x1="8cm" svg:y1="6.25cm" svg:x2="11.887cm" svg:y2="12.001cm" draw:start-shape="id8" draw:start-glue-point="1" svg:d="M8000 6250h1250v5751h2637" svg:viewBox="0 0 3888 5752">
          <text:p/>
        </draw:connector>
        <draw:connector draw:style-name="gr21" draw:text-style-name="P3" draw:layer="layout" draw:line-skew="2.967cm" svg:x1="16.015cm" svg:y1="7.75cm" svg:x2="16.177cm" svg:y2="2.022cm" draw:start-shape="id9" draw:start-glue-point="1" svg:d="M16015 7750h3485v-5728h-3323" svg:viewBox="0 0 3486 5729">
          <text:p/>
        </draw:connector>
        <draw:connector draw:style-name="gr22" draw:text-style-name="P3" draw:layer="layout" draw:line-skew="0.467cm" svg:x1="16.015cm" svg:y1="5.75cm" svg:x2="16.196cm" svg:y2="3.024cm" draw:start-shape="id10" draw:start-glue-point="1" svg:d="M16015 5750h985v-2726h-804" svg:viewBox="0 0 986 2727">
          <text:p/>
        </draw:connector>
        <draw:connector draw:style-name="gr23" draw:text-style-name="P3" draw:layer="layout" draw:line-skew="0.967cm" svg:x1="16.015cm" svg:y1="3.75cm" svg:x2="16.158cm" svg:y2="11.018cm" draw:start-shape="id11" draw:start-glue-point="1" svg:d="M16015 3750h1485v7268h-1342" svg:viewBox="0 0 1486 7269">
          <text:p/>
        </draw:connector>
        <draw:connector draw:style-name="gr24" draw:text-style-name="P3" draw:layer="layout" draw:line-skew="1.467cm" svg:x1="16.015cm" svg:y1="4.75cm" svg:x2="16.215cm" svg:y2="10.054cm" draw:start-shape="id12" draw:start-glue-point="1" svg:d="M16015 4750h1985v5304h-1785" svg:viewBox="0 0 1986 5305">
          <text:p/>
        </draw:connector>
        <draw:connector draw:style-name="gr25" draw:text-style-name="P3" draw:layer="layout" draw:line-skew="0.217cm" svg:x1="16.015cm" svg:y1="5.25cm" svg:x2="16.12cm" svg:y2="7.522cm" draw:start-shape="id13" draw:start-glue-point="1" svg:d="M16015 5250h735v2272h-630" svg:viewBox="0 0 736 2273">
          <text:p/>
        </draw:connector>
        <draw:connector draw:style-name="gr26" draw:text-style-name="P3" draw:layer="layout" draw:line-skew="2.217cm" svg:x1="16.015cm" svg:y1="6.25cm" svg:x2="16.158cm" svg:y2="11.982cm" draw:start-shape="id14" draw:start-glue-point="1" svg:d="M16015 6250h2735v5732h-2592" svg:viewBox="0 0 2736 57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5T13:59:16.999672200</meta:creation-date>
    <dc:date>2026-07-05T14:50:33.665062000</dc:date>
    <meta:editing-duration>PT7M37S</meta:editing-duration>
    <meta:editing-cycles>2</meta:editing-cycles>
    <meta:generator>LibreOffice/26.2.1.2$Windows_X86_64 LibreOffice_project/620$Build-2</meta:generator>
    <meta:document-statistic meta:object-count="63"/>
  </office:meta>
</office:document-meta>
</file>