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5.5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25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28cm" svg:stroke-color="#000000" draw:marker-start-width="0.242cm" draw:marker-end="线条箭头_20_3" draw:marker-end-width="0.342cm" draw:fill="none" draw:textarea-vertical-align="middle" fo:padding-top="0.139cm" fo:padding-bottom="0.139cm" fo:padding-left="0.264cm" fo:padding-right="0.264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线条箭头_20_4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线条箭头_20_5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线条箭头_20_6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2cm" draw:marker-end="线条箭头_20_7" draw:marker-end-width="0.3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000000" draw:marker-start-width="0.252cm" draw:marker-end="线条箭头_20_8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="线条箭头_20_9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="线条箭头_20_10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线条箭头_20_11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objectwithoutfill">
      <style:graphic-properties svg:stroke-width="0.035cm" svg:stroke-color="#000000" draw:marker-start-width="0.252cm" draw:marker-end="线条箭头_20_12" draw:marker-end-width="0.3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objectwithoutfill">
      <style:graphic-properties svg:stroke-width="0.035cm" svg:stroke-color="#000000" draw:marker-start-width="0.252cm" draw:marker-end="线条箭头_20_13" draw:marker-end-width="0.352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svg:stroke-width="0.035cm" svg:stroke-color="#000000" draw:marker-start-width="0.252cm" draw:marker-end="线条箭头_20_14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cm" svg:height="1cm" svg:x="8cm" svg:y="3cm">
          <text:p text:style-name="P1"><text:span text:style-name="T1">上电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cm" svg:x="7cm" svg:y="5cm">
          <text:p text:style-name="P1"><text:span text:style-name="T1">读取上电时引导模式管脚数值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5cm" svg:height="1cm" svg:x="8cm" svg:y="7cm">
          <text:p text:style-name="P1"><text:span text:style-name="T1">确定引导模式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8cm" svg:y="9cm">
          <text:p text:style-name="P1"><text:span text:style-name="T1">eFUSE</text:span><text:span text:style-name="T1">引导模式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2cm" svg:y="9cm">
          <text:p text:style-name="P1"><text:span text:style-name="T1">内部引导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4cm" svg:y="9cm">
          <text:p text:style-name="P1"><text:span text:style-name="T1">串行</text:span><text:span text:style-name="T1">USB</text:span><text:span text:style-name="T1">下装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2cm" svg:y="11cm">
          <text:p text:style-name="P1"><text:span text:style-name="T1">读取覆盖管脚</text:span><text:span text:style-name="T1">GPIO</text:span><text:span text:style-name="T1">的值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8cm" svg:y="12cm">
          <text:p text:style-name="P1"><text:span text:style-name="T1">确认引导器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4cm" svg:y="11cm">
          <text:p text:style-name="P1"><text:span text:style-name="T1">初始化</text:span><text:span text:style-name="T1">USB</text:span><text:span text:style-name="T1">硬件及</text:span><text:span text:style-name="T1">eMMC</text:span><text:span text:style-name="T1">驱动器件初始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1cm" svg:x="14cm" svg:y="13cm">
          <text:p text:style-name="P1"><text:span text:style-name="T1">等待下装程序运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1cm" svg:x="8cm" svg:y="14cm">
          <text:p text:style-name="P1"><text:span text:style-name="T1">初始化相应器件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cm" svg:x="7cm" svg:y="16cm">
          <text:p text:style-name="P1"><text:span text:style-name="T1">依</text:span><text:span text:style-name="T1">据</text:span><text:span text:style-name="T1">器</text:span><text:span text:style-name="T1">件</text:span><text:span text:style-name="T1">类</text:span><text:span text:style-name="T1">型</text:span><text:span text:style-name="T1">，</text:span><text:span text:style-name="T1">从</text:span><text:span text:style-name="T1">相</text:span><text:span text:style-name="T1">应</text:span><text:span text:style-name="T1">位</text:span><text:span text:style-name="T1">置</text:span><text:span text:style-name="T1">读</text:span><text:span text:style-name="T1">取</text:span><text:span text:style-name="T1">IVT</text:span><text:span text:style-name="T1">信</text:span><text:span text:style-name="T1">息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cm" svg:x="6.956cm" svg:y="18cm">
          <text:p text:style-name="P1"><text:span text:style-name="T1">读取并运行</text:span><text:span text:style-name="T1">DCD</text:span><text:span text:style-name="T1">，进行简</text:span><text:span text:style-name="T1">单系统配置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cm" svg:x="7cm" svg:y="20cm">
          <text:p text:style-name="P1"><text:span text:style-name="T1">导</text:span><text:span text:style-name="T1">入</text:span><text:span text:style-name="T1">u-</text:span><text:span text:style-name="T1">boo</text:span><text:span text:style-name="T1">t</text:span><text:span text:style-name="T1">中</text:span><text:span text:style-name="T1">的</text:span><text:span text:style-name="T1">初</text:span><text:span text:style-name="T1">始</text:span><text:span text:style-name="T1">引</text:span><text:span text:style-name="T1">导</text:span><text:span text:style-name="T1">程</text:span><text:span text:style-name="T1">序</text:span><text:span text:style-name="T1">，</text:span><text:span text:style-name="T1">把</text:span><text:span text:style-name="T1">控</text:span><text:span text:style-name="T1">制</text:span><text:span text:style-name="T1">权</text:span><text:span text:style-name="T1">交</text:span><text:span text:style-name="T1">予</text:span><text:span text:style-name="T1">u-</text:span><text:span text:style-name="T1">boo</text:span><text:span text:style-name="T1">t</text:span><text:span text:style-name="T1">，</text:span><text:span text:style-name="T1">开</text:span><text:span text:style-name="T1">始</text:span><text:span text:style-name="T1">运</text:span><text:span text:style-name="T1">行</text:span><text:span text:style-name="T1">u-</text:span><text:span text:style-name="T1">boo</text:span><text:span text:style-name="T1">t</text:span><text:span text:style-name="T1">引</text:span><text:span text:style-name="T1">导</text:span><text:span text:style-name="T1">程</text:span><text:span text:style-name="T1">序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cm" svg:y1="4cm" svg:x2="10cm" svg:y2="5cm">
          <text:p/>
        </draw:line>
        <draw:line draw:style-name="gr5" draw:text-style-name="P2" draw:layer="layout" svg:x1="10cm" svg:y1="6cm" svg:x2="10cm" svg:y2="7cm">
          <text:p/>
        </draw:line>
        <draw:line draw:style-name="gr6" draw:text-style-name="P2" draw:layer="layout" svg:x1="10cm" svg:y1="8cm" svg:x2="10cm" svg:y2="9cm">
          <text:p/>
        </draw:line>
        <draw:line draw:style-name="gr7" draw:text-style-name="P2" draw:layer="layout" svg:x1="10cm" svg:y1="10cm" svg:x2="10cm" svg:y2="12cm">
          <text:p/>
        </draw:line>
        <draw:line draw:style-name="gr8" draw:text-style-name="P2" draw:layer="layout" svg:x1="10cm" svg:y1="13cm" svg:x2="10cm" svg:y2="14cm">
          <text:p/>
        </draw:line>
        <draw:line draw:style-name="gr9" draw:text-style-name="P2" draw:layer="layout" svg:x1="10cm" svg:y1="15cm" svg:x2="10cm" svg:y2="16cm">
          <text:p/>
        </draw:line>
        <draw:line draw:style-name="gr10" draw:text-style-name="P2" draw:layer="layout" svg:x1="10cm" svg:y1="17cm" svg:x2="10cm" svg:y2="18cm">
          <text:p/>
        </draw:line>
        <draw:line draw:style-name="gr11" draw:text-style-name="P2" draw:layer="layout" svg:x1="10cm" svg:y1="19cm" svg:x2="10cm" svg:y2="20cm">
          <text:p/>
        </draw:line>
        <draw:line draw:style-name="gr12" draw:text-style-name="P2" draw:layer="layout" svg:x1="4cm" svg:y1="10cm" svg:x2="4cm" svg:y2="11cm">
          <text:p/>
        </draw:line>
        <draw:line draw:style-name="gr13" draw:text-style-name="P2" draw:layer="layout" svg:x1="16cm" svg:y1="10cm" svg:x2="16cm" svg:y2="11cm">
          <text:p/>
        </draw:line>
        <draw:line draw:style-name="gr14" draw:text-style-name="P2" draw:layer="layout" svg:x1="16cm" svg:y1="12cm" svg:x2="16cm" svg:y2="13cm">
          <text:p/>
        </draw:line>
        <draw:line draw:style-name="gr15" draw:text-style-name="P2" draw:layer="layout" svg:x1="10cm" svg:y1="8.5cm" svg:x2="4cm" svg:y2="8.5cm">
          <text:p/>
        </draw:line>
        <draw:line draw:style-name="gr15" draw:text-style-name="P2" draw:layer="layout" svg:x1="10cm" svg:y1="8.5cm" svg:x2="16cm" svg:y2="8.5cm">
          <text:p/>
        </draw:line>
        <draw:line draw:style-name="gr16" draw:text-style-name="P2" draw:layer="layout" svg:x1="4cm" svg:y1="8.5cm" svg:x2="4cm" svg:y2="9cm">
          <text:p/>
        </draw:line>
        <draw:line draw:style-name="gr17" draw:text-style-name="P2" draw:layer="layout" svg:x1="16cm" svg:y1="8.5cm" svg:x2="16cm" svg:y2="9cm">
          <text:p/>
        </draw:line>
        <draw:line draw:style-name="gr18" draw:text-style-name="P2" draw:layer="layout" svg:x1="6cm" svg:y1="11.5cm" svg:x2="10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4T14:01:18.330749300</meta:creation-date>
    <dc:date>2026-06-24T16:06:57.552430500</dc:date>
    <meta:editing-duration>PT16M20S</meta:editing-duration>
    <meta:editing-cycles>3</meta:editing-cycles>
    <meta:generator>LibreOffice/26.2.1.2$Windows_X86_64 LibreOffice_project/620$Build-2</meta:generator>
    <meta:print-date>2026-06-24T16:02:11.602668100</meta:print-date>
    <meta:printed-by>PDF 文件</meta:printed-by>
    <meta:document-statistic meta:object-count="30"/>
  </office:meta>
</office:document-meta>
</file>