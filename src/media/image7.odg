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0080" draw:textarea-horizontal-align="justify" draw:textarea-vertical-align="middle" draw:auto-grow-height="false" fo:min-height="1.75cm" fo:min-width="7.5cm" loext:decorative="false"/>
      <style:paragraph-properties style:writing-mode="lr-tb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3" style:family="graphic" style:parent-style-name="standard">
      <style:graphic-properties draw:fill="solid" draw:fill-color="#ffbf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4" style:family="graphic" style:parent-style-name="standard">
      <style:graphic-properties draw:fill="solid" draw:fill-color="#ff80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5" style:family="graphic" style:parent-style-name="standard">
      <style:graphic-properties draw:fill="solid" draw:fill-color="#ff40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0008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8000"/>
      <style:paragraph-properties fo:text-align="center"/>
    </style:style>
    <style:style style:name="P6" style:family="paragraph">
      <loext:graphic-properties draw:fill="solid" draw:fill-color="#ff4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8cm" svg:height="2cm" svg:x="6cm" svg:y="12cm">
          <text:p text:style-name="P1"><text:span text:style-name="T1">磁盘分区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6cm" svg:y="14cm">
          <text:p text:style-name="P1"><text:span text:style-name="T1">JM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8cm" svg:y="14cm">
          <text:p text:style-name="P1"><text:span text:style-name="T1">文件系统头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0cm" svg:y="14cm">
          <text:p text:style-name="P1"><text:span text:style-name="T1">bootstrap</text:span><text:span text:style-name="T1">代码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14cm">
          <text:p text:style-name="P1"><text:span text:style-name="T1">扇区尾</text:span><text:span text:style-name="T1">(0x55</text:span></text:p>
          <text:p text:style-name="P1"><text:span text:style-name="T1">0xAA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4T11:08:32.781586700</meta:creation-date>
    <dc:date>2026-06-24T13:56:35.211477800</dc:date>
    <meta:editing-duration>PT2H36M52S</meta:editing-duration>
    <meta:editing-cycles>3</meta:editing-cycles>
    <meta:generator>LibreOffice/26.2.1.2$Windows_X86_64 LibreOffice_project/620$Build-2</meta:generator>
    <meta:print-date>2026-06-24T11:30:41.202671200</meta:print-date>
    <meta:printed-by>PDF 文件</meta:printed-by>
    <meta:document-statistic meta:object-count="5"/>
  </office:meta>
</office:document-meta>
</file>