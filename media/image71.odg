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58466" draw:textarea-horizontal-align="left" draw:textarea-vertical-align="top" draw:auto-grow-height="false" fo:min-height="1.75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7.716cm" fo:min-width="3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fill="solid" draw:fill-color="#bf0041" draw:textarea-horizontal-align="justify" draw:textarea-vertical-align="middle" draw:auto-grow-height="false" fo:min-height="0.2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158466" loext:fill-use-slide-background="false" draw:textarea-horizontal-align="justify" draw:textarea-vertical-align="middle" draw:auto-grow-height="false" fo:min-height="6.716cm" fo:min-width="3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3.216cm" fo:min-width="3.71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00a933" draw:textarea-horizontal-align="justify" draw:textarea-vertical-align="middle" draw:auto-grow-height="false" fo:min-height="0.716cm" fo:min-width="3.716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25cm" fo:min-width="3.75cm" loext:decorative="false"/>
      <style:paragraph-properties style:writing-mode="lr-tb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2.75cm" fo:min-width="3.5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25cm" fo:min-width="3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middle" fo:min-height="0.683cm" loext:decorative="false"/>
      <style:paragraph-properties style:writing-mode="lr-tb"/>
    </style:style>
    <style:style style:name="P1" style:family="paragraph">
      <style:paragraph-properties fo:text-align="lef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58466"/>
      <style:paragraph-properties fo:text-align="lef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f0041"/>
      <style:paragraph-properties fo:text-align="center" style:writing-mode="lr-tb"/>
    </style:style>
    <style:style style:name="P6" style:family="paragraph">
      <loext:graphic-properties draw:fill="none" draw:fill-color="#158466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3" draw:layer="layout" svg:width="4cm" svg:height="2cm" svg:x="3cm" svg:y="9cm">
          <text:p text:style-name="P1"><text:span text:style-name="T1">Struct thread_info {</text:span></text:p>
          <text:p text:style-name="P2"><text:span text:style-name="T1"/></text:p>
          <text:p text:style-name="P2"><text:span text:style-name="T1">Task</text:span></text:p>
          <text:p text:style-name="P2"><text:span text:style-name="T1"/></text:p>
          <text:p text:style-name="P1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8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cm" svg:height="0.5cm" svg:x="3cm" svg:y="5.5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7cm" svg:x="1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cm" svg:height="0.5cm" svg:x="11cm" svg:y="6cm">
          <text:p text:style-name="P2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5cm" svg:height="3.5cm" svg:x="11cm" svg:y="11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cm" svg:y1="6.25cm" svg:x2="17cm" svg:y2="6.25cm">
          <text:p/>
        </draw:line>
        <draw:line draw:style-name="gr6" draw:text-style-name="P4" draw:layer="layout" svg:x1="17cm" svg:y1="11cm" svg:x2="17cm" svg:y2="6.25cm">
          <text:p/>
        </draw:line>
        <draw:line draw:style-name="gr7" draw:text-style-name="P4" draw:layer="layout" svg:x1="17cm" svg:y1="11cm" svg:x2="15.25cm" svg:y2="11cm">
          <text:p/>
        </draw:line>
        <draw:custom-shape draw:style-name="gr8" draw:text-style-name="P8" draw:layer="layout" svg:width="4.25cm" svg:height="1cm" svg:x="11cm" svg:y="15cm">
          <text:p text:style-name="P2"><text:span text:style-name="T1">Struct thread_info {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25cm" svg:height="0.5cm" svg:x="11cm" svg:y="14.5cm">
          <text:p text:style-name="P2"><text:span text:style-name="T1">魔术字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cm" svg:height="3cm" svg:x="3cm" svg:y="13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cm" svg:y1="5.75cm" svg:x2="9cm" svg:y2="5.75cm">
          <text:p/>
        </draw:line>
        <draw:line draw:style-name="gr6" draw:text-style-name="P4" draw:layer="layout" svg:x1="9cm" svg:y1="13cm" svg:x2="9cm" svg:y2="5.75cm">
          <text:p/>
        </draw:line>
        <draw:line draw:style-name="gr11" draw:text-style-name="P4" draw:layer="layout" svg:x1="9cm" svg:y1="13cm" svg:x2="7cm" svg:y2="13cm">
          <text:p/>
        </draw:line>
        <draw:custom-shape draw:style-name="gr12" draw:text-style-name="P9" draw:layer="layout" svg:width="4cm" svg:height="0.5cm" svg:x="3cm" svg:y="16cm">
          <text:p text:style-name="P2"><text:span text:style-name="T1">魔术字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cm" svg:x="2.5cm" svg:y="2cm">
          <draw:text-box>
            <text:p text:style-name="P2"><text:span text:style-name="T1">thread_info</text:span><text:span text:style-name="T1">在</text:span><text:span text:style-name="T1">task_struct</text:span><text:span text:style-name="T1">内</text:span></text:p>
            <text:p text:style-name="P2"><text:span text:style-name="T1">Struct task_struct</text:span></text:p>
          </draw:text-box>
        </draw:frame>
        <draw:frame draw:style-name="gr14" draw:text-style-name="P11" draw:layer="layout" svg:width="5cm" svg:height="0.933cm" svg:x="10.5cm" svg:y="2.009cm">
          <draw:text-box>
            <text:p text:style-name="P2"><text:span text:style-name="T1">thread_info</text:span><text:span text:style-name="T1">不在</text:span><text:span text:style-name="T1">task_struct</text:span><text:span text:style-name="T1">内</text:span></text:p>
            <text:p text:style-name="P2"><text:span text:style-name="T1">Struct task_stru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6T11:40:42.071075400</meta:creation-date>
    <dc:date>2026-06-27T09:18:15.791123800</dc:date>
    <meta:editing-duration>PT6H46M56S</meta:editing-duration>
    <meta:editing-cycles>3</meta:editing-cycles>
    <meta:generator>LibreOffice/26.2.1.2$Windows_X86_64 LibreOffice_project/620$Build-2</meta:generator>
    <meta:document-statistic meta:object-count="18"/>
  </office:meta>
</office:document-meta>
</file>