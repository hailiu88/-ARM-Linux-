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20000019000030FE00003C5DBFCB382D.svm" manifest:media-type="image/x-svm"/>
  <manifest:file-entry manifest:full-path="Pictures/10000000000001DB00000249340F543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2.541cm" svg:height="15.452cm" svg:x="4.348cm" svg:y="7.184cm">
          <draw:image xlink:href="Pictures/20000019000030FE00003C5DBFCB382D.svm" xlink:type="simple" xlink:show="embed" xlink:actuate="onLoad" draw:mime-type="image/x-svm">
            <text:p/>
          </draw:image>
          <draw:image xlink:href="Pictures/10000000000001DB00000249340F543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7T15:06:15.527130700</meta:creation-date>
    <dc:date>2026-06-27T15:07:04.445045200</dc:date>
    <meta:editing-duration>PT49S</meta:editing-duration>
    <meta:editing-cycles>1</meta:editing-cycles>
    <meta:document-statistic meta:object-count="1"/>
    <meta:generator>LibreOffice/26.2.1.2$Windows_X86_64 LibreOffice_project/620$Build-2</meta:generator>
  </office:meta>
</office:document-meta>
</file>